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5000001C5830F1310.png" manifest:media-type="image/png"/>
  <manifest:file-entry manifest:full-path="Pictures/10000000000002DE000001D4CD7B3F06.png" manifest:media-type="image/png"/>
  <manifest:file-entry manifest:full-path="Pictures/10000000000002DE000001D44A2C675B.png" manifest:media-type="image/png"/>
  <manifest:file-entry manifest:full-path="Pictures/10000000000002DE000001D4C203B173.png" manifest:media-type="image/png"/>
  <manifest:file-entry manifest:full-path="Pictures/10000000000002DE000001D4A6CF3F09.png" manifest:media-type="image/png"/>
  <manifest:file-entry manifest:full-path="Pictures/1000000000000302000001C569FB9983.png" manifest:media-type="image/png"/>
  <manifest:file-entry manifest:full-path="Pictures/10000000000002F9000001C5918F5B8B.png" manifest:media-type="image/png"/>
  <manifest:file-entry manifest:full-path="Pictures/1000000000000272000001C54AA5C0D7.png" manifest:media-type="image/png"/>
  <manifest:file-entry manifest:full-path="Pictures/10000000000002DE000001C56BF20131.png" manifest:media-type="image/png"/>
  <manifest:file-entry manifest:full-path="Pictures/10000000000002DE000001D42D9BD947.png" manifest:media-type="image/png"/>
  <manifest:file-entry manifest:full-path="Pictures/1000000000000260000001C5CEEED365.png" manifest:media-type="image/png"/>
  <manifest:file-entry manifest:full-path="Pictures/10000000000002DD000001D40DC647AB.png" manifest:media-type="image/png"/>
  <manifest:file-entry manifest:full-path="Pictures/10000000000002E7000001C5FCDEB38E.png" manifest:media-type="image/png"/>
  <manifest:file-entry manifest:full-path="Pictures/10000000000002DD000001D4D4AF1B66.png" manifest:media-type="image/png"/>
  <manifest:file-entry manifest:full-path="Pictures/1000000000000272000001C5D716246D.png" manifest:media-type="image/png"/>
  <manifest:file-entry manifest:full-path="Pictures/10000000000002DD000001D443437BD6.png" manifest:media-type="image/png"/>
  <manifest:file-entry manifest:full-path="Pictures/100000000000027B000001C51D302C6C.png" manifest:media-type="image/png"/>
  <manifest:file-entry manifest:full-path="Pictures/1000000000000284000001C539C8F9CF.png" manifest:media-type="image/png"/>
  <manifest:file-entry manifest:full-path="Pictures/10000000000002DD000001D4D6823443.png" manifest:media-type="image/png"/>
  <manifest:file-entry manifest:full-path="Pictures/1000000000000269000001C56739D69D.png" manifest:media-type="image/png"/>
  <manifest:file-entry manifest:full-path="Pictures/10000000000002DD000001D4173CBE16.png" manifest:media-type="image/png"/>
  <manifest:file-entry manifest:full-path="Pictures/1000000000000269000001C57B1E4F19.png" manifest:media-type="image/png"/>
  <manifest:file-entry manifest:full-path="Pictures/1000000000000269000001C50D364D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6.983cm" table:align="left" style:may-break-between-rows="true" table:border-model="collapsing"/>
    </style:style>
    <style:style style:name="Tableau2.A" style:family="table-column">
      <style:table-column-properties style:column-width="4.124cm"/>
    </style:style>
    <style:style style:name="Tableau2.B" style:family="table-column">
      <style:table-column-properties style:column-width="2.143cm"/>
    </style:style>
    <style:style style:name="Tableau2.1" style:family="table-row">
      <style:table-row-properties style:min-row-height="0.739cm"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 style:data-style-name="N10000">
      <style:table-cell-properties fo:background-color="#00a93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 style:data-style-name="N10000">
      <style:table-cell-properties fo:background-color="#ff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2" style:family="table-cell" style:data-style-name="N10000">
      <style:table-cell-properties fo:background-color="#ff0000" fo:padding="0.097cm" fo:border="0.5pt solid #000000" style:writing-mode="page">
        <style:background-image/>
      </style:table-cell-properties>
    </style:style>
    <style:style style:name="Tableau2.F3" style:family="table-cell" style:data-style-name="N10000">
      <style:table-cell-properties fo:background-color="#00a93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G3" style:family="table-cell" style:data-style-name="N10000">
      <style:table-cell-properties fo:background-color="#ff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style:min-row-height="0.552cm" fo:keep-together="auto"/>
    </style:style>
    <style:style style:name="Tableau2.B13" style:family="table-cell" style:data-style-name="N10000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" style:family="table">
      <style:table-properties style:width="16.986cm" table:align="left" style:may-break-between-rows="true" table:border-model="collapsing"/>
    </style:style>
    <style:style style:name="Tableau1.A" style:family="table-column">
      <style:table-column-properties style:column-width="4.106cm"/>
    </style:style>
    <style:style style:name="Tableau1.B" style:family="table-column">
      <style:table-column-properties style:column-width="2.147cm"/>
    </style:style>
    <style:style style:name="Tableau1.1" style:family="table-row">
      <style:table-row-properties style:min-row-height="0.552cm"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10000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 style:data-style-name="N10000">
      <style:table-cell-properties fo:background-color="#ff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 style:data-style-name="N10000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 style:data-style-name="N10000">
      <style:table-cell-properties fo:background-color="#00a93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0" style:family="table-cell" style:data-style-name="N10000">
      <style:table-cell-properties fo:background-color="#00a93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10" style:family="table-cell" style:data-style-name="N10000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12" style:family="table-cell" style:data-style-name="N10000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2" style:family="table-cell" style:data-style-name="N10000">
      <style:table-cell-properties fo:background-color="#ff0000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paragraph-rsid="000c1e7d" style:font-name-asian="Times New Roman" style:font-size-asian="12pt" style:font-weight-asian="bold" style:font-name-complex="Times New Roman" style:font-size-complex="12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c1e7d" style:font-size-asian="12pt" style:font-size-complex="12pt"/>
    </style:style>
    <style:style style:name="P7" style:family="paragraph" style:parent-style-name="Standard">
      <style:text-properties style:font-name="Liberation Serif" fo:font-size="12pt" fo:font-weight="normal" officeooo:rsid="000c1e7d" officeooo:paragraph-rsid="000c1e7d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e9a05" officeooo:paragraph-rsid="000e9a05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0ffd5b" officeooo:paragraph-rsid="0011151e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945e3" officeooo:paragraph-rsid="002945e3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4fb6" officeooo:paragraph-rsid="000d4fb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e9a05" officeooo:paragraph-rsid="000e9a0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e9a05" officeooo:paragraph-rsid="0011151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e9a05" officeooo:paragraph-rsid="00156a8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e9a05" officeooo:paragraph-rsid="000ffd5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e9a05" officeooo:paragraph-rsid="0027f50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e9a05" officeooo:paragraph-rsid="002a31b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126201" officeooo:paragraph-rsid="0012da21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201" officeooo:paragraph-rsid="00126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201" officeooo:paragraph-rsid="00156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1e" officeooo:paragraph-rsid="00111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1e" officeooo:paragraph-rsid="00156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6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a21" officeooo:paragraph-rsid="0012d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a21" officeooo:paragraph-rsid="00156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949" officeooo:paragraph-rsid="00188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949" officeooo:paragraph-rsid="00156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ab5" officeooo:paragraph-rsid="001f2a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aa0" officeooo:paragraph-rsid="0023b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8f9" officeooo:paragraph-rsid="002558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6a81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font-name="Liberation Serif" fo:font-size="12pt" fo:font-weight="normal" officeooo:rsid="002945e3" officeooo:paragraph-rsid="002945e3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0c1e7d"/>
    </style:style>
    <style:style style:name="T2" style:family="text">
      <style:text-properties fo:font-weight="bold" style:font-name-asian="Times New Roman" style:font-weight-asian="bold" style:font-name-complex="Times New Roman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officeooo:rsid="000db014" style:font-name-asian="Times New Roman" style:font-name-complex="Times New Roman"/>
    </style:style>
    <style:style style:name="T5" style:family="text">
      <style:text-properties officeooo:rsid="000ffd5b" style:font-name-asian="Times New Roman" style:font-name-complex="Times New Roman"/>
    </style:style>
    <style:style style:name="T6" style:family="text">
      <style:text-properties officeooo:rsid="0012da21" style:font-name-asian="Times New Roman" style:font-name-complex="Times New Roman"/>
    </style:style>
    <style:style style:name="T7" style:family="text">
      <style:text-properties officeooo:rsid="00126201" style:font-name-asian="Times New Roman" style:font-name-complex="Times New Roman"/>
    </style:style>
    <style:style style:name="T8" style:family="text">
      <style:text-properties officeooo:rsid="0018bb56" style:font-name-asian="Times New Roman" style:font-name-complex="Times New Roman"/>
    </style:style>
    <style:style style:name="T9" style:family="text">
      <style:text-properties officeooo:rsid="0027f50c" style:font-name-asian="Times New Roman" style:font-name-complex="Times New Roman"/>
    </style:style>
    <style:style style:name="T10" style:family="text">
      <style:text-properties officeooo:rsid="002945e3" style:font-name-asian="Times New Roman" style:font-name-complex="Times New Roman"/>
    </style:style>
    <style:style style:name="T11" style:family="text">
      <style:text-properties officeooo:rsid="002a31bb" style:font-name-asian="Times New Roman" style:font-name-complex="Times New Roman"/>
    </style:style>
    <style:style style:name="T12" style:family="text">
      <style:text-properties officeooo:rsid="002af67e" style:font-name-asian="Times New Roman" style:font-name-complex="Times New Roman"/>
    </style:style>
    <style:style style:name="T13" style:family="text">
      <style:text-properties officeooo:rsid="0012da21"/>
    </style:style>
    <style:style style:name="T14" style:family="text">
      <style:text-properties officeooo:rsid="00156a81"/>
    </style:style>
    <style:style style:name="T15" style:family="text">
      <style:text-properties officeooo:rsid="0012da21" fo:background-color="#ff0000" loext:char-shading-value="0" style:font-name-asian="Times New Roman" style:font-name-complex="Times New Roman"/>
    </style:style>
    <style:style style:name="T16" style:family="text">
      <style:text-properties officeooo:rsid="0012da21" fo:background-color="#ffff00" loext:char-shading-value="0" style:font-name-asian="Times New Roman" style:font-name-complex="Times New Roman"/>
    </style:style>
    <style:style style:name="T17" style:family="text">
      <style:text-properties officeooo:rsid="0012da21" fo:background-color="#00a933" loext:char-shading-value="0" style:font-name-asian="Times New Roman" style:font-name-complex="Times New Roman"/>
    </style:style>
    <style:style style:name="T18" style:family="text">
      <style:text-properties officeooo:rsid="002945e3"/>
    </style:style>
    <style:style style:name="T19" style:family="text">
      <style:text-properties officeooo:rsid="002a31bb"/>
    </style:style>
    <style:style style:name="T20" style:family="text">
      <style:text-properties officeooo:rsid="002af67e"/>
    </style:style>
    <style:style style:name="T21" style:family="text">
      <style:text-properties officeooo:rsid="002e5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Report</text:p>
      <text:p text:style-name="P1"/>
      <text:p text:style-name="P1">Thierry Sae-Lim – Norikazu Takahashi</text:p>
      <text:p text:style-name="P1">Okayama University</text:p>
      <text:p text:style-name="P1"><text:span text:style-name="T1">July</text:span> <text:span text:style-name="T21">24</text:span>, 2026</text:p>
      <text:p text:style-name="P2"/>
      <text:p text:style-name="P3">Research Objective and Goal</text:p>
      <text:p text:style-name="P5">The final goal of the project is to implement the distributed algorithm for PCA (Principal Component Analysis) developped by our lab and test its validity based on numerical experiment. </text:p>
      <text:p text:style-name="P5"/>
      <text:p text:style-name="P4">Short-Term Goals</text:p>
      <text:p text:style-name="P7">8. Adding a new variable to set the number of iteration for the consensus of the matrices Y and Z separately.</text:p>
      <text:p text:style-name="P8">9. <text:span text:style-name="T1">Study the parameters </text:span>T_CONS_Y and T_CONS_Z, and <text:span text:style-name="T1">K1, K2, and EPS and its implication on the convergence speed.</text:span></text:p>
      <text:p text:style-name="P6"><text:span text:style-name="T2"/></text:p>
      <text:p text:style-name="P4">Progress</text:p>
      <text:p text:style-name="P11"><text:span text:style-name="T3">8.<text:tab/></text:span><text:span text:style-name="T4">Done</text:span></text:p>
      <text:p text:style-name="P11"><text:span text:style-name="T4"/></text:p>
      <text:p text:style-name="P12"><text:span text:style-name="T4">9.<text:tab/></text:span><text:span text:style-name="T3">We consider those initial global variables for ploting the same exact instance:</text:span></text:p>
      <text:p text:style-name="P8"><text:tab/>NB_AGENT = 8, NB_EDGE = 25,</text:p>
      <text:p text:style-name="P8"><text:tab/>N_DIM = 5, P_DIM = 3,</text:p>
      <text:p text:style-name="P12"><text:span text:style-name="T3"><text:tab/>T_PM = 1</text:span><text:span text:style-name="T6">4</text:span><text:span text:style-name="T3">000, T_CONS_Y = 1, T_CONS_Z = 1</text:span><text:span text:style-name="T6">0</text:span><text:span text:style-name="T3">,</text:span></text:p>
      <text:p text:style-name="P8"><text:tab/>K1 = 0.2, K2 = 0.4, EPS = 0.1</text:p>
      <text:p text:style-name="P12"><text:span text:style-name="T3"/></text:p>
      <text:p text:style-name="P8">Here is some plots when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3"><text:tab/>- </text:span><text:span text:style-name="T5">changing </text:span><text:span text:style-name="T3">the number of iteration</text:span><text:span text:style-name="T12">s</text:span><text:span text:style-name="T3"> for the average consensus of the matrices </text:span><text:span text:style-name="T5">Y</text:span><text:span text:style-name="T3">_m(t) <text:tab/>T_CONS_</text:span><text:span text:style-name="T5">Y</text:span><text:span text:style-name="T3">:</text:span></text:p>
      <text:p text:style-name="P15"><draw:frame draw:style-name="fr1" draw:name="Image2" text:anchor-type="char" svg:x="-0.023cm" svg:y="0.226cm" svg:width="5.71cm" svg:height="4.189cm" draw:z-index="2"><draw:image xlink:href="Pictures/1000000000000269000001C57B1E4F19.png" xlink:type="simple" xlink:show="embed" xlink:actuate="onLoad" draw:mime-type="image/png"/></draw:frame><draw:frame draw:style-name="fr1" draw:name="Image4" text:anchor-type="char" svg:x="5.685cm" svg:y="0.226cm" svg:width="5.63cm" svg:height="4.189cm" draw:z-index="3"><draw:image xlink:href="Pictures/1000000000000260000001C5CEEED365.png" xlink:type="simple" xlink:show="embed" xlink:actuate="onLoad" draw:mime-type="image/png"/></draw:frame><draw:frame draw:style-name="fr1" draw:name="Image5" text:anchor-type="char" svg:x="11.227cm" svg:y="0.226cm" svg:width="5.71cm" svg:height="4.189cm" draw:z-index="4"><draw:image xlink:href="Pictures/1000000000000269000001C56739D69D.png" xlink:type="simple" xlink:show="embed" xlink:actuate="onLoad" draw:mime-type="image/png"/></draw:frame><draw:frame draw:style-name="fr1" draw:name="Image15" text:anchor-type="char" svg:x="-0.492cm" svg:y="4.413cm" svg:width="5.8cm" svg:height="4.189cm" draw:z-index="14"><draw:image xlink:href="Pictures/1000000000000272000001C5D716246D.png" xlink:type="simple" xlink:show="embed" xlink:actuate="onLoad" draw:mime-type="image/png"/></draw:frame><draw:frame draw:style-name="fr1" draw:name="Image16" text:anchor-type="char" svg:x="5.306cm" svg:y="4.413cm" svg:width="5.881cm" svg:height="4.189cm" draw:z-index="15"><draw:image xlink:href="Pictures/100000000000027B000001C51D302C6C.png" xlink:type="simple" xlink:show="embed" xlink:actuate="onLoad" draw:mime-type="image/png"/></draw:frame><draw:frame draw:style-name="fr1" draw:name="Image17" text:anchor-type="char" svg:x="11.185cm" svg:y="4.413cm" svg:width="5.96cm" svg:height="4.189cm" draw:z-index="16"><draw:image xlink:href="Pictures/1000000000000284000001C539C8F9CF.png" xlink:type="simple" xlink:show="embed" xlink:actuate="onLoad" draw:mime-type="image/png"/></draw:frame><text:span text:style-name="T3"/></text:p>
      <text:p text:style-name="P15"><text:span text:style-name="T3"/></text:p>
      <text:p text:style-name="P14"><text:span text:style-name="T6"/></text:p>
      <text:p text:style-name="P14"><draw:frame draw:style-name="fr1" draw:name="Image18" text:anchor-type="char" svg:x="-1.688cm" svg:y="2.759cm" svg:width="6.789cm" svg:height="4.33cm" draw:z-index="17"><draw:image xlink:href="Pictures/10000000000002DD000001D4D4AF1B66.png" xlink:type="simple" xlink:show="embed" xlink:actuate="onLoad" draw:mime-type="image/png"/></draw:frame><draw:frame draw:style-name="fr1" draw:name="Image20" text:anchor-type="char" svg:x="11.887cm" svg:y="2.759cm" svg:width="6.789cm" svg:height="4.33cm" draw:z-index="19"><draw:image xlink:href="Pictures/10000000000002DD000001D4D6823443.png" xlink:type="simple" xlink:show="embed" xlink:actuate="onLoad" draw:mime-type="image/png"/></draw:frame><draw:frame draw:style-name="fr1" draw:name="Image21" text:anchor-type="char" svg:x="1.499cm" svg:y="7.087cm" svg:width="6.789cm" svg:height="4.33cm" draw:z-index="20"><draw:image xlink:href="Pictures/10000000000002DD000001D4173CBE16.png" xlink:type="simple" xlink:show="embed" xlink:actuate="onLoad" draw:mime-type="image/png"/></draw:frame><draw:frame draw:style-name="fr1" draw:name="Image22" text:anchor-type="char" svg:x="8.287cm" svg:y="7.087cm" svg:width="6.789cm" svg:height="4.33cm" draw:z-index="21"><draw:image xlink:href="Pictures/10000000000002DD000001D40DC647AB.png" xlink:type="simple" xlink:show="embed" xlink:actuate="onLoad" draw:mime-type="image/png"/></draw:frame><text:span text:style-name="T6">Table </text:span><draw:frame draw:style-name="fr1" draw:name="Image19" text:anchor-type="char" svg:x="5.099cm" svg:y="2.759cm" svg:width="6.789cm" svg:height="4.33cm" draw:z-index="18"><draw:image xlink:href="Pictures/10000000000002DD000001D443437BD6.png" xlink:type="simple" xlink:show="embed" xlink:actuate="onLoad" draw:mime-type="image/png"/></draw:frame><text:span text:style-name="T6">of accuracies of the found solutions </text:span><text:span text:style-name="T7">U </text:span><text:span text:style-name="T6">to the optimal solution Q’ while changing the T_CONS_</text:span><text:span text:style-name="T8">Y</text:span><text:span text:style-name="T6"> value. (</text:span><text:span text:style-name="T15">Red</text:span><text:span text:style-name="T6">: inaccurate for all agents, </text:span><text:span text:style-name="T16">Yellow</text:span><text:span text:style-name="T6">: accurate and inacurrate for some agents, </text:span><text:span text:style-name="T17">Green</text:span><text:span text:style-name="T6">: accurate for all agents)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able:table table:name="Tableau2" table:style-name="Tableau2" table:template-name="Default Style">
        <table:table-column table:style-name="Tableau2.A"/>
        <table:table-column table:style-name="Tableau2.B" table:number-columns-repeated="6"/>
        <text:soft-page-break/>
        <table:table-row table:style-name="Tableau2.1">
          <table:table-cell table:style-name="Tableau2.A1" office:value-type="string">
            <text:p text:style-name="P20"><text:s text:c="10"/>Accuracy <text:span text:style-name="T13">at</text:span> 1e-i</text:p>
            <text:p text:style-name="P20">T_CONS_<text:span text:style-name="T14">Y</text:span> <text:s text:c="3"/></text:p>
          </table:table-cell>
          <table:table-cell table:style-name="Tableau2.A1" office:value-type="string">
            <text:p text:style-name="P22">1</text:p>
          </table:table-cell>
          <table:table-cell table:style-name="Tableau2.A1" office:value-type="string">
            <text:p text:style-name="P22">2</text:p>
          </table:table-cell>
          <table:table-cell table:style-name="Tableau2.A1" office:value-type="string">
            <text:p text:style-name="P22">3</text:p>
          </table:table-cell>
          <table:table-cell table:style-name="Tableau2.A1" office:value-type="string">
            <text:p text:style-name="P22">4</text:p>
          </table:table-cell>
          <table:table-cell table:style-name="Tableau2.F1" office:value-type="string">
            <text:p text:style-name="P26">5</text:p>
          </table:table-cell>
          <table:table-cell table:style-name="Tableau2.F1" office:value-type="string">
            <text:p text:style-name="P27">6</text:p>
          </table:table-cell>
        </table:table-row>
        <table:table-row table:style-name="Tableau2.1">
          <table:table-cell table:style-name="Tableau2.A2" office:value-type="string">
            <text:p text:style-name="P22">0</text:p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F2">
            <text:p text:style-name="P33"/>
          </table:table-cell>
          <table:table-cell table:style-name="Tableau2.G2">
            <text:p text:style-name="P33"/>
          </table:table-cell>
        </table:table-row>
        <table:table-row table:style-name="Tableau2.1">
          <table:table-cell table:style-name="Tableau2.A2" office:value-type="string">
            <text:p text:style-name="P28">1</text:p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B2">
            <text:p text:style-name="P33"/>
          </table:table-cell>
          <table:table-cell table:style-name="Tableau2.F3">
            <text:p text:style-name="P33"/>
          </table:table-cell>
          <table:table-cell table:style-name="Tableau2.G3">
            <text:p text:style-name="P33"/>
          </table:table-cell>
        </table:table-row>
        <table:table-row table:style-name="Tableau2.1">
          <table:table-cell table:style-name="Tableau2.A2" office:value-type="string">
            <text:p text:style-name="P30">2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3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4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5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6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7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8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9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F3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0">10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F3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3">
          <table:table-cell table:style-name="Tableau2.A1" office:value-type="string">
            <text:p text:style-name="P30">11</text:p>
          </table:table-cell>
          <table:table-cell table:style-name="Tableau2.B13">
            <text:p text:style-name="P24"/>
          </table:table-cell>
          <table:table-cell table:style-name="Tableau2.B13">
            <text:p text:style-name="P24"/>
          </table:table-cell>
          <table:table-cell table:style-name="Tableau2.B13">
            <text:p text:style-name="P24"/>
          </table:table-cell>
          <table:table-cell table:style-name="Tableau2.B13">
            <text:p text:style-name="P24"/>
          </table:table-cell>
          <table:table-cell table:style-name="Tableau2.B13">
            <text:p text:style-name="P24"/>
          </table:table-cell>
          <table:table-cell table:style-name="Tableau2.G2">
            <text:p text:style-name="P24"/>
          </table:table-cell>
        </table:table-row>
        <table:table-row table:style-name="Tableau2.13">
          <table:table-cell table:style-name="Tableau2.A2" office:value-type="string">
            <text:p text:style-name="P30">12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3">
          <table:table-cell table:style-name="Tableau2.A2" office:value-type="string">
            <text:p text:style-name="P30">13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3">
          <table:table-cell table:style-name="Tableau2.A2" office:value-type="string">
            <text:p text:style-name="P30">14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  <table:table-row table:style-name="Tableau2.13">
          <table:table-cell table:style-name="Tableau2.A2" office:value-type="string">
            <text:p text:style-name="P30">15</text:p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B2">
            <text:p text:style-name="P24"/>
          </table:table-cell>
          <table:table-cell table:style-name="Tableau2.G3">
            <text:p text:style-name="P24"/>
          </table:table-cell>
        </table:table-row>
      </table:table>
      <text:p text:style-name="P14"><text:span text:style-name="T3"/></text:p>
      <text:p text:style-name="P17"><text:span text:style-name="T9">We can observe that </text:span><text:span text:style-name="T10">the number of iteration</text:span><text:span text:style-name="T12">s</text:span><text:span text:style-name="T10"> for the averaging consensus of matrices Y doesn’t really affect the convergence. A smaller number of iteration</text:span><text:span text:style-name="T12">s</text:span><text:span text:style-name="T10"> can be conpensated with a larger number iteration</text:span><text:span text:style-name="T12">s</text:span><text:span text:style-name="T10"> of the update rule. A too large </text:span><text:span text:style-name="T12">value of</text:span><text:span text:style-name="T10"> </text:span><text:span text:style-name="T12">T_CONS_Y</text:span><text:span text:style-name="T10"> shouldn’t be necessary.</text:span><text:span text:style-name="T11"> The T_CONS_Y=0 curve is showing a convergence with 0 iteration of the averaging consensus of Y, that is to say, with the use of matrices U to compute Z. We can conclude that computing the matrices Y isn’t even necessary for the convergence with a sufficiently large number of iterations for the update rule </text:span><text:span text:style-name="T12">T_PM</text:span><text:span text:style-name="T11">.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<text:tab/>- changing the number of iteration</text:span><text:span text:style-name="T12">s</text:span><text:span text:style-name="T3"> for the average consensus of the matrices </text:span><text:span text:style-name="T5">Z</text:span><text:span text:style-name="T3">_m(t) <text:tab/>T_CONS_</text:span><text:span text:style-name="T5">Z</text:span><text:span text:style-name="T3">:</text:span></text:p>
      <text:p text:style-name="P13"><draw:frame draw:style-name="fr1" draw:name="Image6" text:anchor-type="char" svg:x="12.061cm" svg:y="0.014cm" svg:width="6.72cm" svg:height="4.33cm" draw:z-index="5"><draw:image xlink:href="Pictures/1000000000000269000001C50D364D34.png" xlink:type="simple" xlink:show="embed" xlink:actuate="onLoad" draw:mime-type="image/png"/></draw:frame><draw:frame draw:style-name="fr1" draw:name="Image1" text:anchor-type="char" svg:x="-1.545cm" svg:y="0.155cm" svg:width="6.81cm" svg:height="4.189cm" draw:z-index="0"><draw:image xlink:href="Pictures/10000000000002E7000001C5FCDEB38E.png" xlink:type="simple" xlink:show="embed" xlink:actuate="onLoad" draw:mime-type="image/png"/></draw:frame><draw:frame draw:style-name="fr1" draw:name="Image3" text:anchor-type="char" svg:x="5.263cm" svg:y="0.014cm" svg:width="6.8cm" svg:height="4.33cm" draw:z-index="1"><draw:image xlink:href="Pictures/10000000000002DE000001C56BF20131.png" xlink:type="simple" xlink:show="embed" xlink:actuate="onLoad" draw:mime-type="image/png"/></draw:frame><draw:frame draw:style-name="fr1" draw:name="Image7" text:anchor-type="char" svg:x="-1.443cm" svg:y="4.343cm" svg:width="5.8cm" svg:height="4.189cm" draw:z-index="6"><draw:image xlink:href="Pictures/1000000000000272000001C54AA5C0D7.png" xlink:type="simple" xlink:show="embed" xlink:actuate="onLoad" draw:mime-type="image/png"/></draw:frame><draw:frame draw:style-name="fr1" draw:name="Image8" text:anchor-type="char" svg:x="4.355cm" svg:y="4.343cm" svg:width="7.05cm" svg:height="4.189cm" draw:z-index="7"><draw:image xlink:href="Pictures/10000000000002F9000001C5918F5B8B.png" xlink:type="simple" xlink:show="embed" xlink:actuate="onLoad" draw:mime-type="image/png"/></draw:frame><draw:frame draw:style-name="fr1" draw:name="Image9" text:anchor-type="char" svg:x="11.404cm" svg:y="4.343cm" svg:width="7.13cm" svg:height="4.189cm" draw:z-index="8"><draw:image xlink:href="Pictures/1000000000000302000001C569FB9983.png" xlink:type="simple" xlink:show="embed" xlink:actuate="onLoad" draw:mime-type="image/png"/></draw:frame><text:span text:style-name="T3"/></text:p>
      <text:p text:style-name="P18"><draw:frame draw:style-name="fr1" draw:name="Image10" text:anchor-type="char" svg:x="-1.736cm" svg:y="4.149cm" svg:width="6.8cm" svg:height="4.33cm" draw:z-index="9"><draw:image xlink:href="Pictures/10000000000002DE000001D42D9BD947.png" xlink:type="simple" xlink:show="embed" xlink:actuate="onLoad" draw:mime-type="image/png"/></draw:frame><draw:frame draw:style-name="fr1" draw:name="Image12" text:anchor-type="char" svg:x="11.899cm" svg:y="4.149cm" svg:width="6.8cm" svg:height="4.33cm" draw:z-index="11"><draw:image xlink:href="Pictures/10000000000002DE000001D4A6CF3F09.png" xlink:type="simple" xlink:show="embed" xlink:actuate="onLoad" draw:mime-type="image/png"/></draw:frame><draw:frame draw:style-name="fr1" draw:name="Image13" text:anchor-type="char" svg:x="1.443cm" svg:y="8.477cm" svg:width="6.8cm" svg:height="4.33cm" draw:z-index="12"><draw:image xlink:href="Pictures/10000000000002DE000001D4C203B173.png" xlink:type="simple" xlink:show="embed" xlink:actuate="onLoad" draw:mime-type="image/png"/></draw:frame><draw:frame draw:style-name="fr1" draw:name="Image14" text:anchor-type="char" svg:x="8.241cm" svg:y="8.477cm" svg:width="6.8cm" svg:height="4.33cm" draw:z-index="13"><draw:image xlink:href="Pictures/10000000000002DE000001D44A2C675B.png" xlink:type="simple" xlink:show="embed" xlink:actuate="onLoad" draw:mime-type="image/png"/></draw:frame><text:span text:style-name="T6">Table of</text:span><draw:frame draw:style-name="fr1" draw:name="Image11" text:anchor-type="char" svg:x="5.062cm" svg:y="4.149cm" svg:width="6.8cm" svg:height="4.33cm" draw:z-index="10"><draw:image xlink:href="Pictures/10000000000002DE000001D4CD7B3F06.png" xlink:type="simple" xlink:show="embed" xlink:actuate="onLoad" draw:mime-type="image/png"/></draw:frame><text:span text:style-name="T6"> accuracies of the found solutions </text:span><text:span text:style-name="T3">U </text:span><text:span text:style-name="T6">to the optimal solution Q’ while changing the T_CONS_Z value. (</text:span><text:span text:style-name="T15">Red</text:span><text:span text:style-name="T6">: inaccurate for all agents, </text:span><text:span text:style-name="T16">Yellow</text:span><text:span text:style-name="T6">: accurate and inacurrate for some agents, </text:span><text:span text:style-name="T17">Green</text:span><text:span text:style-name="T6">: accurate for all agents)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able:table table:name="Tableau1" table:style-name="Tableau1" table:template-name="Default Style">
        <table:table-column table:style-name="Tableau1.A"/>
        <table:table-column table:style-name="Tableau1.B" table:number-columns-repeated="6"/>
        <text:soft-page-break/>
        <table:table-row table:style-name="Tableau1.1">
          <table:table-cell table:style-name="Tableau1.A1" office:value-type="string">
            <text:p text:style-name="P19"><text:s text:c="10"/>Accuracy <text:span text:style-name="T13">at</text:span> 1e-i</text:p>
            <text:p text:style-name="P19">T_CONS_Z <text:s text:c="3"/></text:p>
          </table:table-cell>
          <table:table-cell table:style-name="Tableau1.A1" office:value-type="string">
            <text:p text:style-name="P21">1</text:p>
          </table:table-cell>
          <table:table-cell table:style-name="Tableau1.A1" office:value-type="string">
            <text:p text:style-name="P21">2</text:p>
          </table:table-cell>
          <table:table-cell table:style-name="Tableau1.A1" office:value-type="string">
            <text:p text:style-name="P21">3</text:p>
          </table:table-cell>
          <table:table-cell table:style-name="Tableau1.A1" office:value-type="string">
            <text:p text:style-name="P21">4</text:p>
          </table:table-cell>
          <table:table-cell table:style-name="Tableau1.F1" office:value-type="string">
            <text:p text:style-name="P25">5</text:p>
          </table:table-cell>
          <table:table-cell table:style-name="Tableau1.F1" office:value-type="string">
            <text:p text:style-name="P29">6</text:p>
          </table:table-cell>
        </table:table-row>
        <table:table-row table:style-name="Tableau1.1">
          <table:table-cell table:style-name="Tableau1.A2" office:value-type="string">
            <text:p text:style-name="P21">0</text:p>
          </table:table-cell>
          <table:table-cell table:style-name="Tableau1.B2">
            <text:p text:style-name="P32"/>
          </table:table-cell>
          <table:table-cell table:style-name="Tableau1.B2">
            <text:p text:style-name="P32"/>
          </table:table-cell>
          <table:table-cell table:style-name="Tableau1.B2">
            <text:p text:style-name="P32"/>
          </table:table-cell>
          <table:table-cell table:style-name="Tableau1.B2">
            <text:p text:style-name="P32"/>
          </table:table-cell>
          <table:table-cell table:style-name="Tableau1.F2">
            <text:p text:style-name="P32"/>
          </table:table-cell>
          <table:table-cell table:style-name="Tableau1.F2">
            <text:p text:style-name="P32"/>
          </table:table-cell>
        </table:table-row>
        <table:table-row table:style-name="Tableau1.1">
          <table:table-cell table:style-name="Tableau1.A2" office:value-type="string">
            <text:p text:style-name="P21">1</text:p>
          </table:table-cell>
          <table:table-cell table:style-name="Tableau1.B3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2</text:p>
          </table:table-cell>
          <table:table-cell table:style-name="Tableau1.B4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3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4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2">
            <text:p text:style-name="P23"/>
          </table:table-cell>
          <table:table-cell table:style-name="Tableau1.B2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5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2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6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3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7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8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10">
            <text:p text:style-name="P23"/>
          </table:table-cell>
          <table:table-cell table:style-name="Tableau1.G10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1">9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10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1" office:value-type="string">
            <text:p text:style-name="P21">10</text:p>
          </table:table-cell>
          <table:table-cell table:style-name="Tableau1.B12">
            <text:p text:style-name="P23"/>
          </table:table-cell>
          <table:table-cell table:style-name="Tableau1.B12">
            <text:p text:style-name="P23"/>
          </table:table-cell>
          <table:table-cell table:style-name="Tableau1.B12">
            <text:p text:style-name="P23"/>
          </table:table-cell>
          <table:table-cell table:style-name="Tableau1.B12">
            <text:p text:style-name="P23"/>
          </table:table-cell>
          <table:table-cell table:style-name="Tableau1.B12">
            <text:p text:style-name="P23"/>
          </table:table-cell>
          <table:table-cell table:style-name="Tableau1.G1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1">11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1">12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1">13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1">14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1">15</text:p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B4">
            <text:p text:style-name="P23"/>
          </table:table-cell>
          <table:table-cell table:style-name="Tableau1.F2">
            <text:p text:style-name="P23"/>
          </table:table-cell>
        </table:table-row>
      </table:table>
      <text:p text:style-name="P13"/>
      <text:p text:style-name="P9">We can observe that having a larger number of iteration<text:span text:style-name="T20">s</text:span> for the <text:span text:style-name="T19">averaging </text:span>consensus of the matrices Z reduces the convergence error. <text:span text:style-name="T18">The more larger the number of iteration</text:span><text:span text:style-name="T20">s</text:span><text:span text:style-name="T18"> is, the more accurate the </text:span><text:span text:style-name="T19">convergence</text:span><text:span text:style-name="T18"> </text:span><text:span text:style-name="T19">is</text:span><text:span text:style-name="T18">.</text:span></text:p>
      <text:p text:style-name="P9"/>
      <text:p text:style-name="P9"/>
      <text:p text:style-name="P10">At first sight, the number of iteration T_CONS_Z <text:span text:style-name="T19">doesn’t really affect the convergence speed but the accuracy of the convergence. </text:span><text:span text:style-name="T20">However,</text:span><text:span text:style-name="T19"> the number of iteration</text:span><text:span text:style-name="T20">s T_CONS_Y - while not strictly necessary – can maybe be manipulated alongside with the number of iterations of the update rule T_PM to reduce the overall number of iterations of the decetralized algorithm for PCA.</text:span></text:p>
      <text:p text:style-name="P10"/>
      <text:p text:style-name="P10">- <text:span text:style-name="T20">changing the update rule parameter K1</text:span></text:p>
      <text:p text:style-name="P10"><draw:frame draw:style-name="fr1" draw:name="Image23" text:anchor-type="char" svg:x="2.411cm" svg:y="0.138cm" svg:width="12.18cm" svg:height="6.59cm" draw:z-index="22"><draw:image xlink:href="Pictures/1000000000000345000001C5830F13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7T23:17:44.869063883</meta:creation-date>
    <dc:date>2026-07-23T23:26:15.557306893</dc:date>
    <meta:editing-duration>PT15H52M38S</meta:editing-duration>
    <meta:editing-cycles>13</meta:editing-cycles>
    <meta:generator>LibreOffice/24.2.7.2$Linux_X86_64 LibreOffice_project/420$Build-2</meta:generator>
    <meta:document-statistic meta:table-count="2" meta:image-count="23" meta:object-count="0" meta:page-count="5" meta:paragraph-count="73" meta:word-count="492" meta:character-count="2765" meta:non-whitespace-character-count="2307"/>
  </office:meta>
</office:document-meta>
</file>